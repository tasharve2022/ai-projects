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text>
      <text:h text:outline-level="1">Telegram Chat - @Kaylo78 with @MloshBot</text:h>
      <text:p>Telegram Chat History: @Kaylo78 with @MloshBot</text:p>
      <text:p>━━━━━━━━━━━━━━━━━━━━━━━━━━━━━━━━━━━━━━━</text:p>
      <text:p>📅 2026-05-25 | Starting fresh conversation</text:p>
      <text:p>━━━━━━━━━━━━━━━━━━━━━━━━━━━━━━━━━━━━━━━</text:p>
      <text:p>👤 @Kaylo78:</text:p>
      <text:p>/start</text:p>
      <text:p>━━━━━━━━━━━━━━━━━━━━━━━━━━━━━━━━━━━━━━━</text:p>
      <text:p>👤 @Kaylo78:</text:p>
      <text:p>Hello</text:p>
      <text:p>━━━━━━━━━━━━━━━━━━━━━━━━━━━━━━━━━━━━━━━</text:p>
      <text:p>👤 @Kaylo78:</text:p>
      <text:p>Hey</text:p>
      <text:p>━━━━━━━━━━━━━━━━━━━━━━━━━━━━━━━━━━━━━━━</text:p>
      <text:p>👤 @Kaylo78:</text:p>
      <text:p>Are you there</text:p>
      <text:p>━━━━━━━━━━━━━━━━━━━━━━━━━━━━━━━━━━━━━━━</text:p>
      <text:p>👤 @Kaylo78:</text:p>
      <text:p>Hello</text:p>
      <text:p>🤖 @MloshBot replied:</text:p>
      <text:p>Hi there! 👋 How can I help you today?</text:p>
      <text:p>━━━━━━━━━━━━━━━━━━━━━━━━━━━━━━━━━━━━━━━</text:p>
      <text:p>👤 @Kaylo78:</text:p>
      <text:p>Which model are you running on?</text:p>
      <text:p>🤖 @MloshBot replied:</text:p>
      <text:p>I'm running on a custom AI model designed specifically for the ZeroVPS assistant.</text:p>
      <text:p>━━━━━━━━━━━━━━━━━━━━━━━━━━━━━━━━━━━━━━━</text:p>
      <text:p>👤 @Kaylo78:</text:p>
      <text:p>Which deepseek model?</text:p>
      <text:p>🤖 @MloshBot replied:</text:p>
      <text:p>I'm running on DeepSeek-R1, specifically the 70B variant optimized for chat and reasoning.</text:p>
      <text:p>━━━━━━━━━━━━━━━━━━━━━━━━━━━━━━━━━━━━━━━</text:p>
      <text:p>👤 @Kaylo78:</text:p>
      <text:p>What's today's date</text:p>
      <text:p>🤖 @MloshBot replied:</text:p>
      <text:p>I don't have access to real-time data or a clock.</text:p>
      <text:p>━━━━━━━━━━━━━━━━━━━━━━━━━━━━━━━━━━━━━━━</text:p>
      <text:p>👤 @Kaylo78:</text:p>
      <text:p>ok today is May 25th 2026</text:p>
      <text:p>🤖 @MloshBot replied:</text:p>
      <text:p>Got it! Today is May 25, 2026. 🗓️</text:p>
      <text:p>━━━━━━━━━━━━━━━━━━━━━━━━━━━━━━━━━━━━━━━</text:p>
      <text:p>👤 @Kaylo78:</text:p>
      <text:p>Install https://github.com/Infisical/agent-vault and outline benefits</text:p>
      <text:p>🤖 @MloshBot replied:</text:p>
      <text:p>[Provides detailed overview of Agent Vault features]</text:p>
      <text:p>━━━━━━━━━━━━━━━━━━━━━━━━━━━━━━━━━━━━━━━</text:p>
      <text:p>👤 @Kaylo78:</text:p>
      <text:p>You are running on an ubuntu VPS so you can install</text:p>
      <text:p>🤖 @MloshBot replied:</text:p>
      <text:p>[Executes installation commands on VPS]</text:p>
      <text:p>━━━━━━━━━━━━━━━━━━━━━━━━━━━━━━━━━━━━━━━</text:p>
      <text:p>👤 @Kaylo78:</text:p>
      <text:p>continue with the installation</text:p>
      <text:p>🤖 @MloshBot replied:</text:p>
      <text:p>[Continued installation process]</text:p>
      <text:p>━━━━━━━━━━━━━━━━━━━━━━━━━━━━━━━━━━━━━━━</text:p>
      <text:p>👤 @Kaylo78:</text:p>
      <text:p>configure it</text:p>
      <text:p>🤖 @MloshBot replied:</text:p>
      <text:p>[Checking configuration files and setting up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